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87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5.04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dos_finales_limpios_E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oblema</text:p>
          </table:table-cell>
          <table:table-cell office:value-type="string" calcext:value-type="string">
            <text:p>Semilla</text:p>
          </table:table-cell>
          <table:table-cell office:value-type="string" calcext:value-type="string">
            <text:p>Tiempo_CPU</text:p>
          </table:table-cell>
          <table:table-cell office:value-type="string" calcext:value-type="string">
            <text:p>Nodos</text:p>
          </table:table-cell>
          <table:table-cell office:value-type="string" calcext:value-type="string">
            <text:p>E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59</text:p>
          </table:table-cell>
          <table:table-cell office:value-type="float" office:value="11470" calcext:value-type="float">
            <text:p>1147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.18</text:p>
          </table:table-cell>
          <table:table-cell office:value-type="float" office:value="9200" calcext:value-type="float">
            <text:p>920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30.70</text:p>
          </table:table-cell>
          <table:table-cell office:value-type="float" office:value="14662" calcext:value-type="float">
            <text:p>1466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6.81</text:p>
          </table:table-cell>
          <table:table-cell office:value-type="float" office:value="13124" calcext:value-type="float">
            <text:p>1312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9.17</text:p>
          </table:table-cell>
          <table:table-cell office:value-type="float" office:value="9180" calcext:value-type="float">
            <text:p>918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3.60</text:p>
          </table:table-cell>
          <table:table-cell office:value-type="float" office:value="11316" calcext:value-type="float">
            <text:p>1131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26.76</text:p>
          </table:table-cell>
          <table:table-cell office:value-type="float" office:value="12794" calcext:value-type="float">
            <text:p>1279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24.47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4.94</text:p>
          </table:table-cell>
          <table:table-cell office:value-type="float" office:value="12122" calcext:value-type="float">
            <text:p>1212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21.22</text:p>
          </table:table-cell>
          <table:table-cell office:value-type="float" office:value="10564" calcext:value-type="float">
            <text:p>1056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5.17</text:p>
          </table:table-cell>
          <table:table-cell office:value-type="float" office:value="23952" calcext:value-type="float">
            <text:p>2395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78.40</text:p>
          </table:table-cell>
          <table:table-cell office:value-type="float" office:value="26140" calcext:value-type="float">
            <text:p>2614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300.72</text:p>
          </table:table-cell>
          <table:table-cell office:value-type="float" office:value="29008" calcext:value-type="float">
            <text:p>2900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85.94</text:p>
          </table:table-cell>
          <table:table-cell office:value-type="float" office:value="27134" calcext:value-type="float">
            <text:p>2713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289.43</text:p>
          </table:table-cell>
          <table:table-cell office:value-type="float" office:value="26918" calcext:value-type="float">
            <text:p>2691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85.85</text:p>
          </table:table-cell>
          <table:table-cell office:value-type="float" office:value="26778" calcext:value-type="float">
            <text:p>2677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259.27</text:p>
          </table:table-cell>
          <table:table-cell office:value-type="float" office:value="24206" calcext:value-type="float">
            <text:p>2420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259.47</text:p>
          </table:table-cell>
          <table:table-cell office:value-type="float" office:value="24084" calcext:value-type="float">
            <text:p>2408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79.49</text:p>
          </table:table-cell>
          <table:table-cell office:value-type="float" office:value="26490" calcext:value-type="float">
            <text:p>2649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258.39</text:p>
          </table:table-cell>
          <table:table-cell office:value-type="float" office:value="24142" calcext:value-type="float">
            <text:p>2414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57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21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0.90</text:p>
          </table:table-cell>
          <table:table-cell office:value-type="float" office:value="4412" calcext:value-type="float">
            <text:p>441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2.84</text:p>
          </table:table-cell>
          <table:table-cell office:value-type="float" office:value="4864" calcext:value-type="float">
            <text:p>486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5.6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6.93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11.036287</text:p>
          </table:table-cell>
          <table:table-cell office:value-type="float" office:value="4352" calcext:value-type="float">
            <text:p>435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13.648604</text:p>
          </table:table-cell>
          <table:table-cell office:value-type="float" office:value="5442" calcext:value-type="float">
            <text:p>544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6.59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12.42</text:p>
          </table:table-cell>
          <table:table-cell office:value-type="float" office:value="4718" calcext:value-type="float">
            <text:p>471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6.34</text:p>
          </table:table-cell>
          <table:table-cell office:value-type="float" office:value="34798" calcext:value-type="float">
            <text:p>3479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7.20</text:p>
          </table:table-cell>
          <table:table-cell office:value-type="float" office:value="35638" calcext:value-type="float">
            <text:p>3563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63.13</text:p>
          </table:table-cell>
          <table:table-cell office:value-type="float" office:value="39114" calcext:value-type="float">
            <text:p>3911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6.40</text:p>
          </table:table-cell>
          <table:table-cell office:value-type="float" office:value="35352" calcext:value-type="float">
            <text:p>3535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63.46</text:p>
          </table:table-cell>
          <table:table-cell office:value-type="float" office:value="47592" calcext:value-type="float">
            <text:p>4759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55.99</text:p>
          </table:table-cell>
          <table:table-cell office:value-type="float" office:value="34042" calcext:value-type="float">
            <text:p>3404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60.70</text:p>
          </table:table-cell>
          <table:table-cell office:value-type="float" office:value="38482" calcext:value-type="float">
            <text:p>3848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59.36</text:p>
          </table:table-cell>
          <table:table-cell office:value-type="float" office:value="38044" calcext:value-type="float">
            <text:p>3804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66.84</text:p>
          </table:table-cell>
          <table:table-cell office:value-type="float" office:value="42726" calcext:value-type="float">
            <text:p>4272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61.86</text:p>
          </table:table-cell>
          <table:table-cell office:value-type="float" office:value="41872" calcext:value-type="float">
            <text:p>4187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1.174491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8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762928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8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40.56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9.920033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8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40.61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88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41.21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88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41.38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88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38.23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8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41.0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88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41.28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1.432698</text:p>
          </table:table-cell>
          <table:table-cell office:value-type="float" office:value="448154" calcext:value-type="float">
            <text:p>44815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68.745982</text:p>
          </table:table-cell>
          <table:table-cell office:value-type="float" office:value="441348" calcext:value-type="float">
            <text:p>44134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69.724275</text:p>
          </table:table-cell>
          <table:table-cell office:value-type="float" office:value="447450" calcext:value-type="float">
            <text:p>44745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47.883175</text:p>
          </table:table-cell>
          <table:table-cell office:value-type="float" office:value="389116" calcext:value-type="float">
            <text:p>38911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276.250241</text:p>
          </table:table-cell>
          <table:table-cell office:value-type="float" office:value="452690" calcext:value-type="float">
            <text:p>45269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48.905301</text:p>
          </table:table-cell>
          <table:table-cell office:value-type="float" office:value="390794" calcext:value-type="float">
            <text:p>39079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250.622491</text:p>
          </table:table-cell>
          <table:table-cell office:value-type="float" office:value="396968" calcext:value-type="float">
            <text:p>39696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255.15</text:p>
          </table:table-cell>
          <table:table-cell office:value-type="float" office:value="397292" calcext:value-type="float">
            <text:p>39729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68.314328</text:p>
          </table:table-cell>
          <table:table-cell office:value-type="float" office:value="443998" calcext:value-type="float">
            <text:p>44399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272.112512</text:p>
          </table:table-cell>
          <table:table-cell office:value-type="float" office:value="445396" calcext:value-type="float">
            <text:p>44539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0.49</text:p>
          </table:table-cell>
          <table:table-cell office:value-type="float" office:value="184724" calcext:value-type="float">
            <text:p>18472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92.18</text:p>
          </table:table-cell>
          <table:table-cell office:value-type="float" office:value="187874" calcext:value-type="float">
            <text:p>18787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93.89</text:p>
          </table:table-cell>
          <table:table-cell office:value-type="float" office:value="187334" calcext:value-type="float">
            <text:p>18733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95.59</text:p>
          </table:table-cell>
          <table:table-cell office:value-type="float" office:value="191266" calcext:value-type="float">
            <text:p>19126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94.80</text:p>
          </table:table-cell>
          <table:table-cell office:value-type="float" office:value="188658" calcext:value-type="float">
            <text:p>18865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190.92</text:p>
          </table:table-cell>
          <table:table-cell office:value-type="float" office:value="185930" calcext:value-type="float">
            <text:p>18593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193.89</text:p>
          </table:table-cell>
          <table:table-cell office:value-type="float" office:value="186978" calcext:value-type="float">
            <text:p>18697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192.89</text:p>
          </table:table-cell>
          <table:table-cell office:value-type="float" office:value="188260" calcext:value-type="float">
            <text:p>18826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94.54</text:p>
          </table:table-cell>
          <table:table-cell office:value-type="float" office:value="188808" calcext:value-type="float">
            <text:p>18880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194.84</text:p>
          </table:table-cell>
          <table:table-cell office:value-type="float" office:value="187738" calcext:value-type="float">
            <text:p>18773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4.17</text:p>
          </table:table-cell>
          <table:table-cell office:value-type="float" office:value="76150" calcext:value-type="float">
            <text:p>7615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5.91</text:p>
          </table:table-cell>
          <table:table-cell office:value-type="float" office:value="80298" calcext:value-type="float">
            <text:p>8029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44.42</text:p>
          </table:table-cell>
          <table:table-cell office:value-type="float" office:value="76998" calcext:value-type="float">
            <text:p>7699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44.61</text:p>
          </table:table-cell>
          <table:table-cell office:value-type="float" office:value="77548" calcext:value-type="float">
            <text:p>7754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44.40</text:p>
          </table:table-cell>
          <table:table-cell office:value-type="float" office:value="77934" calcext:value-type="float">
            <text:p>7793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45.26</text:p>
          </table:table-cell>
          <table:table-cell office:value-type="float" office:value="79274" calcext:value-type="float">
            <text:p>7927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44.46</text:p>
          </table:table-cell>
          <table:table-cell office:value-type="float" office:value="76546" calcext:value-type="float">
            <text:p>7654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44.99</text:p>
          </table:table-cell>
          <table:table-cell office:value-type="float" office:value="78016" calcext:value-type="float">
            <text:p>7801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45.81</text:p>
          </table:table-cell>
          <table:table-cell office:value-type="float" office:value="79208" calcext:value-type="float">
            <text:p>7920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46.77</text:p>
          </table:table-cell>
          <table:table-cell office:value-type="float" office:value="80912" calcext:value-type="float">
            <text:p>8091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2.26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.11</text:p>
          </table:table-cell>
          <table:table-cell office:value-type="float" office:value="14560" calcext:value-type="float">
            <text:p>1456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43.16</text:p>
          </table:table-cell>
          <table:table-cell office:value-type="float" office:value="14550" calcext:value-type="float">
            <text:p>1455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43.56</text:p>
          </table:table-cell>
          <table:table-cell office:value-type="float" office:value="15292" calcext:value-type="float">
            <text:p>1529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41.33</text:p>
          </table:table-cell>
          <table:table-cell office:value-type="float" office:value="15094" calcext:value-type="float">
            <text:p>1509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48.366259</text:p>
          </table:table-cell>
          <table:table-cell office:value-type="float" office:value="16862" calcext:value-type="float">
            <text:p>1686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41.23</text:p>
          </table:table-cell>
          <table:table-cell office:value-type="float" office:value="14526" calcext:value-type="float">
            <text:p>1452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40.51</text:p>
          </table:table-cell>
          <table:table-cell office:value-type="float" office:value="14116" calcext:value-type="float">
            <text:p>1411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41.90</text:p>
          </table:table-cell>
          <table:table-cell office:value-type="float" office:value="14334" calcext:value-type="float">
            <text:p>1433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43.44</text:p>
          </table:table-cell>
          <table:table-cell office:value-type="float" office:value="15174" calcext:value-type="float">
            <text:p>1517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9.021255</text:p>
          </table:table-cell>
          <table:table-cell office:value-type="float" office:value="16842" calcext:value-type="float">
            <text:p>1684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.63</text:p>
          </table:table-cell>
          <table:table-cell office:value-type="float" office:value="17694" calcext:value-type="float">
            <text:p>1769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49.61</text:p>
          </table:table-cell>
          <table:table-cell office:value-type="float" office:value="16998" calcext:value-type="float">
            <text:p>1699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1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48.98</text:p>
          </table:table-cell>
          <table:table-cell office:value-type="float" office:value="16936" calcext:value-type="float">
            <text:p>1693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17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52.54</text:p>
          </table:table-cell>
          <table:table-cell office:value-type="float" office:value="18250" calcext:value-type="float">
            <text:p>1825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17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49.38</text:p>
          </table:table-cell>
          <table:table-cell office:value-type="float" office:value="17066" calcext:value-type="float">
            <text:p>1706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17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49.51</text:p>
          </table:table-cell>
          <table:table-cell office:value-type="float" office:value="17030" calcext:value-type="float">
            <text:p>1703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17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50.25</text:p>
          </table:table-cell>
          <table:table-cell office:value-type="float" office:value="17278" calcext:value-type="float">
            <text:p>1727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51.93</text:p>
          </table:table-cell>
          <table:table-cell office:value-type="float" office:value="18188" calcext:value-type="float">
            <text:p>1818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17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49.22</text:p>
          </table:table-cell>
          <table:table-cell office:value-type="float" office:value="16974" calcext:value-type="float">
            <text:p>1697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1.431004</text:p>
          </table:table-cell>
          <table:table-cell office:value-type="float" office:value="448154" calcext:value-type="float">
            <text:p>44815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68.368099</text:p>
          </table:table-cell>
          <table:table-cell office:value-type="float" office:value="441348" calcext:value-type="float">
            <text:p>44134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69.261169</text:p>
          </table:table-cell>
          <table:table-cell office:value-type="float" office:value="447450" calcext:value-type="float">
            <text:p>44745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47.629830</text:p>
          </table:table-cell>
          <table:table-cell office:value-type="float" office:value="389116" calcext:value-type="float">
            <text:p>38911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276.450381</text:p>
          </table:table-cell>
          <table:table-cell office:value-type="float" office:value="452690" calcext:value-type="float">
            <text:p>45269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48.905474</text:p>
          </table:table-cell>
          <table:table-cell office:value-type="float" office:value="390794" calcext:value-type="float">
            <text:p>39079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251.177553</text:p>
          </table:table-cell>
          <table:table-cell office:value-type="float" office:value="396968" calcext:value-type="float">
            <text:p>39696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255.56</text:p>
          </table:table-cell>
          <table:table-cell office:value-type="float" office:value="397292" calcext:value-type="float">
            <text:p>39729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67.725408</text:p>
          </table:table-cell>
          <table:table-cell office:value-type="float" office:value="443998" calcext:value-type="float">
            <text:p>44399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271.063972</text:p>
          </table:table-cell>
          <table:table-cell office:value-type="float" office:value="445396" calcext:value-type="float">
            <text:p>44539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846498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903396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36.457233</text:p>
          </table:table-cell>
          <table:table-cell office:value-type="float" office:value="4108" calcext:value-type="float">
            <text:p>410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7.263385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28.319202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3.964670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20.853022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25.57098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2.604903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19.032018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64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.43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6.48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6.64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6.61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6.97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6.85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7.18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6.61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6.57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9.b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03</text:p>
          </table:table-cell>
          <table:table-cell office:value-type="float" office:value="5076" calcext:value-type="float">
            <text:p>507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9.b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4</text:p>
          </table:table-cell>
          <table:table-cell office:value-type="float" office:value="5076" calcext:value-type="float">
            <text:p>507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9.bch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4.80</text:p>
          </table:table-cell>
          <table:table-cell office:value-type="float" office:value="4924" calcext:value-type="float">
            <text:p>492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9.bc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11</text:p>
          </table:table-cell>
          <table:table-cell office:value-type="float" office:value="5186" calcext:value-type="float">
            <text:p>518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9.bch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5.19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9.bc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4.96</text:p>
          </table:table-cell>
          <table:table-cell office:value-type="float" office:value="4956" calcext:value-type="float">
            <text:p>495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9.bc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4.99</text:p>
          </table:table-cell>
          <table:table-cell office:value-type="float" office:value="5086" calcext:value-type="float">
            <text:p>508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9.bch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5.12</text:p>
          </table:table-cell>
          <table:table-cell office:value-type="float" office:value="5248" calcext:value-type="float">
            <text:p>524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9.bch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4.98</text:p>
          </table:table-cell>
          <table:table-cell office:value-type="float" office:value="5094" calcext:value-type="float">
            <text:p>509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9.bch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5.20</text:p>
          </table:table-cell>
          <table:table-cell office:value-type="float" office:value="5274" calcext:value-type="float">
            <text:p>527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2_8.b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.26</text:p>
          </table:table-cell>
          <table:table-cell office:value-type="float" office:value="31984" calcext:value-type="float">
            <text:p>3198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2_8.b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.15</text:p>
          </table:table-cell>
          <table:table-cell office:value-type="float" office:value="31946" calcext:value-type="float">
            <text:p>3194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2_8.bch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7.16</text:p>
          </table:table-cell>
          <table:table-cell office:value-type="float" office:value="31974" calcext:value-type="float">
            <text:p>3197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2_8.bc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7.10</text:p>
          </table:table-cell>
          <table:table-cell office:value-type="float" office:value="31776" calcext:value-type="float">
            <text:p>3177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2_8.bch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7.09</text:p>
          </table:table-cell>
          <table:table-cell office:value-type="float" office:value="31892" calcext:value-type="float">
            <text:p>3189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2_8.bc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17.08</text:p>
          </table:table-cell>
          <table:table-cell office:value-type="float" office:value="31684" calcext:value-type="float">
            <text:p>3168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2_8.bc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17.11</text:p>
          </table:table-cell>
          <table:table-cell office:value-type="float" office:value="31924" calcext:value-type="float">
            <text:p>3192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2_8.bch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17.160164</text:p>
          </table:table-cell>
          <table:table-cell office:value-type="float" office:value="31892" calcext:value-type="float">
            <text:p>3189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2_8.bch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7.18</text:p>
          </table:table-cell>
          <table:table-cell office:value-type="float" office:value="31908" calcext:value-type="float">
            <text:p>3190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2_8.bch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17.15</text:p>
          </table:table-cell>
          <table:table-cell office:value-type="float" office:value="31880" calcext:value-type="float">
            <text:p>3188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fi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.62</text:p>
          </table:table-cell>
          <table:table-cell office:value-type="float" office:value="18436" calcext:value-type="float">
            <text:p>18436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odfi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9.94</text:p>
          </table:table-cell>
          <table:table-cell office:value-type="float" office:value="18488" calcext:value-type="float">
            <text:p>1848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odfit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0.25</text:p>
          </table:table-cell>
          <table:table-cell office:value-type="float" office:value="18538" calcext:value-type="float">
            <text:p>1853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odfit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.54</text:p>
          </table:table-cell>
          <table:table-cell office:value-type="float" office:value="18038" calcext:value-type="float">
            <text:p>1803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odfit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20.15</text:p>
          </table:table-cell>
          <table:table-cell office:value-type="float" office:value="18686" calcext:value-type="float">
            <text:p>18686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odfit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0.37</text:p>
          </table:table-cell>
          <table:table-cell office:value-type="float" office:value="17934" calcext:value-type="float">
            <text:p>17934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odfits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20.11</text:p>
          </table:table-cell>
          <table:table-cell office:value-type="float" office:value="18222" calcext:value-type="float">
            <text:p>18222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odfits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20.05</text:p>
          </table:table-cell>
          <table:table-cell office:value-type="float" office:value="18522" calcext:value-type="float">
            <text:p>18522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odfi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9.97</text:p>
          </table:table-cell>
          <table:table-cell office:value-type="float" office:value="18338" calcext:value-type="float">
            <text:p>1833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odfits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20.08</text:p>
          </table:table-cell>
          <table:table-cell office:value-type="float" office:value="17832" calcext:value-type="float">
            <text:p>17832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14_1_7.b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4.99</text:p>
          </table:table-cell>
          <table:table-cell office:value-type="float" office:value="14936" calcext:value-type="float">
            <text:p>14936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14_1_7.b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1.57</text:p>
          </table:table-cell>
          <table:table-cell office:value-type="float" office:value="17978" calcext:value-type="float">
            <text:p>1797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14_1_7.bch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45.66</text:p>
          </table:table-cell>
          <table:table-cell office:value-type="float" office:value="16130" calcext:value-type="float">
            <text:p>16130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14_1_7.bc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44.42</text:p>
          </table:table-cell>
          <table:table-cell office:value-type="float" office:value="16472" calcext:value-type="float">
            <text:p>16472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14_1_7.bch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50.19</text:p>
          </table:table-cell>
          <table:table-cell office:value-type="float" office:value="17656" calcext:value-type="float">
            <text:p>17656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14_1_7.bc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58.48</text:p>
          </table:table-cell>
          <table:table-cell office:value-type="float" office:value="21422" calcext:value-type="float">
            <text:p>21422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14_1_7.bc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47.38</text:p>
          </table:table-cell>
          <table:table-cell office:value-type="float" office:value="17186" calcext:value-type="float">
            <text:p>17186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14_1_7.bch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41.58</text:p>
          </table:table-cell>
          <table:table-cell office:value-type="float" office:value="15920" calcext:value-type="float">
            <text:p>15920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14_1_7.bch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53.43</text:p>
          </table:table-cell>
          <table:table-cell office:value-type="float" office:value="20418" calcext:value-type="float">
            <text:p>2041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14_1_7.bch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50.88</text:p>
          </table:table-cell>
          <table:table-cell office:value-type="float" office:value="19244" calcext:value-type="float">
            <text:p>19244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6.b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5.10</text:p>
          </table:table-cell>
          <table:table-cell office:value-type="float" office:value="60098" calcext:value-type="float">
            <text:p>6009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6.b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.13</text:p>
          </table:table-cell>
          <table:table-cell office:value-type="float" office:value="60180" calcext:value-type="float">
            <text:p>60180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6.bch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34.98</text:p>
          </table:table-cell>
          <table:table-cell office:value-type="float" office:value="60102" calcext:value-type="float">
            <text:p>60102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6.bc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5.04</text:p>
          </table:table-cell>
          <table:table-cell office:value-type="float" office:value="60148" calcext:value-type="float">
            <text:p>6014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6.bch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34.99</text:p>
          </table:table-cell>
          <table:table-cell office:value-type="float" office:value="60298" calcext:value-type="float">
            <text:p>6029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6.bc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35.06</text:p>
          </table:table-cell>
          <table:table-cell office:value-type="float" office:value="60278" calcext:value-type="float">
            <text:p>6027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6.bc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34.96</text:p>
          </table:table-cell>
          <table:table-cell office:value-type="float" office:value="59852" calcext:value-type="float">
            <text:p>59852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6.bch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34.92</text:p>
          </table:table-cell>
          <table:table-cell office:value-type="float" office:value="60196" calcext:value-type="float">
            <text:p>60196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6.bch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35.09</text:p>
          </table:table-cell>
          <table:table-cell office:value-type="float" office:value="60168" calcext:value-type="float">
            <text:p>6016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6.bch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35.02</text:p>
          </table:table-cell>
          <table:table-cell office:value-type="float" office:value="60072" calcext:value-type="float">
            <text:p>60072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9.b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.97</text:p>
          </table:table-cell>
          <table:table-cell office:value-type="float" office:value="21564" calcext:value-type="float">
            <text:p>21564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9.b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.95</text:p>
          </table:table-cell>
          <table:table-cell office:value-type="float" office:value="21550" calcext:value-type="float">
            <text:p>21550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9.bch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3.96</text:p>
          </table:table-cell>
          <table:table-cell office:value-type="float" office:value="21478" calcext:value-type="float">
            <text:p>2147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9.bc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3.94</text:p>
          </table:table-cell>
          <table:table-cell office:value-type="float" office:value="21488" calcext:value-type="float">
            <text:p>2148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9.bch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4.03</text:p>
          </table:table-cell>
          <table:table-cell office:value-type="float" office:value="21494" calcext:value-type="float">
            <text:p>21494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9.bc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13.92</text:p>
          </table:table-cell>
          <table:table-cell office:value-type="float" office:value="21496" calcext:value-type="float">
            <text:p>21496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9.bc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13.95</text:p>
          </table:table-cell>
          <table:table-cell office:value-type="float" office:value="21498" calcext:value-type="float">
            <text:p>2149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9.bch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14.05</text:p>
          </table:table-cell>
          <table:table-cell office:value-type="float" office:value="21580" calcext:value-type="float">
            <text:p>21580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9.bch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4.00</text:p>
          </table:table-cell>
          <table:table-cell office:value-type="float" office:value="21642" calcext:value-type="float">
            <text:p>21642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9.bch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13.97</text:p>
          </table:table-cell>
          <table:table-cell office:value-type="float" office:value="21552" calcext:value-type="float">
            <text:p>2155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2_11.b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.53</text:p>
          </table:table-cell>
          <table:table-cell office:value-type="float" office:value="25762" calcext:value-type="float">
            <text:p>2576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2_11.b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.57</text:p>
          </table:table-cell>
          <table:table-cell office:value-type="float" office:value="25796" calcext:value-type="float">
            <text:p>2579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2_11.bch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3.66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2_11.bc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3.56</text:p>
          </table:table-cell>
          <table:table-cell office:value-type="float" office:value="25702" calcext:value-type="float">
            <text:p>2570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2_11.bch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3.57</text:p>
          </table:table-cell>
          <table:table-cell office:value-type="float" office:value="25834" calcext:value-type="float">
            <text:p>2583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2_11.bc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13.58</text:p>
          </table:table-cell>
          <table:table-cell office:value-type="float" office:value="25958" calcext:value-type="float">
            <text:p>2595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2_11.bc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13.59</text:p>
          </table:table-cell>
          <table:table-cell office:value-type="float" office:value="25996" calcext:value-type="float">
            <text:p>2599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2_11.bch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13.58</text:p>
          </table:table-cell>
          <table:table-cell office:value-type="float" office:value="25876" calcext:value-type="float">
            <text:p>2587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2_11.bch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3.51</text:p>
          </table:table-cell>
          <table:table-cell office:value-type="float" office:value="25690" calcext:value-type="float">
            <text:p>2569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6_2_11.bch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13.57</text:p>
          </table:table-cell>
          <table:table-cell office:value-type="float" office:value="25726" calcext:value-type="float">
            <text:p>2572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38621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.21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6.37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17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6.13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8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6.78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8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5.96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8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6.95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5.16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8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5.4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65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.49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6.51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6.74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6.62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6.99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6.90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7.16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6.55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6.66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62.786911</text:p>
          </table:table-cell>
          <table:table-cell office:value-type="float" office:value="251820" calcext:value-type="float">
            <text:p>25182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7.880516</text:p>
          </table:table-cell>
          <table:table-cell office:value-type="float" office:value="252032" calcext:value-type="float">
            <text:p>252032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350.24</text:p>
          </table:table-cell>
          <table:table-cell office:value-type="float" office:value="242808" calcext:value-type="float">
            <text:p>24280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51.706553</text:p>
          </table:table-cell>
          <table:table-cell office:value-type="float" office:value="241766" calcext:value-type="float">
            <text:p>24176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371.521949</text:p>
          </table:table-cell>
          <table:table-cell office:value-type="float" office:value="266494" calcext:value-type="float">
            <text:p>266494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360.920905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373.88</text:p>
          </table:table-cell>
          <table:table-cell office:value-type="float" office:value="256990" calcext:value-type="float">
            <text:p>256990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360.606439</text:p>
          </table:table-cell>
          <table:table-cell office:value-type="float" office:value="253146" calcext:value-type="float">
            <text:p>25314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359.829280</text:p>
          </table:table-cell>
          <table:table-cell office:value-type="float" office:value="251206" calcext:value-type="float">
            <text:p>251206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359.244519</text:p>
          </table:table-cell>
          <table:table-cell office:value-type="float" office:value="253128" calcext:value-type="float">
            <text:p>253128</text:p>
          </table:table-cell>
          <table:table-cell office:value-type="string" calcext:value-type="string">
            <text:p>[32m optimization successfu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4.36</text:p>
          </table:table-cell>
          <table:table-cell office:value-type="float" office:value="76150" calcext:value-type="float">
            <text:p>76150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5.84</text:p>
          </table:table-cell>
          <table:table-cell office:value-type="float" office:value="80298" calcext:value-type="float">
            <text:p>8029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44.64</text:p>
          </table:table-cell>
          <table:table-cell office:value-type="float" office:value="76998" calcext:value-type="float">
            <text:p>7699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44.82</text:p>
          </table:table-cell>
          <table:table-cell office:value-type="float" office:value="77548" calcext:value-type="float">
            <text:p>7754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44.47</text:p>
          </table:table-cell>
          <table:table-cell office:value-type="float" office:value="77934" calcext:value-type="float">
            <text:p>77934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45.45</text:p>
          </table:table-cell>
          <table:table-cell office:value-type="float" office:value="79274" calcext:value-type="float">
            <text:p>79274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44.46</text:p>
          </table:table-cell>
          <table:table-cell office:value-type="float" office:value="76546" calcext:value-type="float">
            <text:p>76546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45.03</text:p>
          </table:table-cell>
          <table:table-cell office:value-type="float" office:value="78016" calcext:value-type="float">
            <text:p>78016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45.75</text:p>
          </table:table-cell>
          <table:table-cell office:value-type="float" office:value="79208" calcext:value-type="float">
            <text:p>7920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46.78</text:p>
          </table:table-cell>
          <table:table-cell office:value-type="float" office:value="80912" calcext:value-type="float">
            <text:p>80912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936460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1.130434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36.808612</text:p>
          </table:table-cell>
          <table:table-cell office:value-type="float" office:value="4108" calcext:value-type="float">
            <text:p>410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7.358566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28.429979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4.02991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20.981007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25.790734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2.653504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19.02083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34</text:p>
          </table:table-cell>
          <table:table-cell office:value-type="float" office:value="11470" calcext:value-type="float">
            <text:p>11470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.31</text:p>
          </table:table-cell>
          <table:table-cell office:value-type="float" office:value="9200" calcext:value-type="float">
            <text:p>9200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30.29</text:p>
          </table:table-cell>
          <table:table-cell office:value-type="float" office:value="14662" calcext:value-type="float">
            <text:p>14662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6.98</text:p>
          </table:table-cell>
          <table:table-cell office:value-type="float" office:value="13124" calcext:value-type="float">
            <text:p>13124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9.13</text:p>
          </table:table-cell>
          <table:table-cell office:value-type="float" office:value="9180" calcext:value-type="float">
            <text:p>9180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3.56</text:p>
          </table:table-cell>
          <table:table-cell office:value-type="float" office:value="11316" calcext:value-type="float">
            <text:p>11316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26.55</text:p>
          </table:table-cell>
          <table:table-cell office:value-type="float" office:value="12794" calcext:value-type="float">
            <text:p>12794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24.61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5.10</text:p>
          </table:table-cell>
          <table:table-cell office:value-type="float" office:value="12122" calcext:value-type="float">
            <text:p>12122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21.44</text:p>
          </table:table-cell>
          <table:table-cell office:value-type="float" office:value="10564" calcext:value-type="float">
            <text:p>10564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dualc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8.09</text:p>
          </table:table-cell>
          <table:table-cell office:value-type="float" office:value="53362" calcext:value-type="float">
            <text:p>53362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dualc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9.31</text:p>
          </table:table-cell>
          <table:table-cell office:value-type="float" office:value="55250" calcext:value-type="float">
            <text:p>55250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dualc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49.13</text:p>
          </table:table-cell>
          <table:table-cell office:value-type="float" office:value="54606" calcext:value-type="float">
            <text:p>54606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dualc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48.36</text:p>
          </table:table-cell>
          <table:table-cell office:value-type="float" office:value="53740" calcext:value-type="float">
            <text:p>53740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dualc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48.86</text:p>
          </table:table-cell>
          <table:table-cell office:value-type="float" office:value="54906" calcext:value-type="float">
            <text:p>54906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dualc5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48.42</text:p>
          </table:table-cell>
          <table:table-cell office:value-type="float" office:value="54650" calcext:value-type="float">
            <text:p>54650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dualc5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48.27</text:p>
          </table:table-cell>
          <table:table-cell office:value-type="float" office:value="54276" calcext:value-type="float">
            <text:p>54276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dualc5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47.05</text:p>
          </table:table-cell>
          <table:table-cell office:value-type="float" office:value="53234" calcext:value-type="float">
            <text:p>53234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dualc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48.85</text:p>
          </table:table-cell>
          <table:table-cell office:value-type="float" office:value="54352" calcext:value-type="float">
            <text:p>54352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dualc5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47.97</text:p>
          </table:table-cell>
          <table:table-cell office:value-type="float" office:value="53894" calcext:value-type="float">
            <text:p>53894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immelb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.963223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immelb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.05671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immelbk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4.72314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immelb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8.67094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immelbk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7.096006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immelbk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4.45995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immelbk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4.68888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immelbk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5.455983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immelbk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4.40706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immelbk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5.23860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s1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26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s1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.48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s11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0.67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s11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.50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s119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0.63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s11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10.62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s119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10.83</text:p>
          </table:table-cell>
          <table:table-cell office:value-type="float" office:value="2594" calcext:value-type="float">
            <text:p>2594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s119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10.41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s1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0.83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hs119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10.66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8_5_6-1.b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27288</text:p>
          </table:table-cell>
          <table:table-cell office:value-type="float" office:value="2376" calcext:value-type="float">
            <text:p>2376</text:p>
          </table:table-cell>
          <table:table-cell table:number-columns-repeated="2"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8_5_6-1.b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7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8_5_6-1.bch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.069537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8_5_6-1.bc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7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8_5_6-1.bch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18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8_5_6-1.bc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0.06925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8_5_6-1.bc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0.075285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8_5_6-1.bch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0.17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8_5_6-1.bch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069945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8_5_6-1.bch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0.070217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10.b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99.84</text:p>
          </table:table-cell>
          <table:table-cell office:value-type="float" office:value="330828" calcext:value-type="float">
            <text:p>33082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10.b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98.99</text:p>
          </table:table-cell>
          <table:table-cell office:value-type="float" office:value="330828" calcext:value-type="float">
            <text:p>33082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10.bch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300.23</text:p>
          </table:table-cell>
          <table:table-cell office:value-type="float" office:value="330996" calcext:value-type="float">
            <text:p>330996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10.bc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99.85</text:p>
          </table:table-cell>
          <table:table-cell office:value-type="float" office:value="330752" calcext:value-type="float">
            <text:p>330752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10.bch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299.11</text:p>
          </table:table-cell>
          <table:table-cell office:value-type="float" office:value="330632" calcext:value-type="float">
            <text:p>330632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10.bc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99.70</text:p>
          </table:table-cell>
          <table:table-cell office:value-type="float" office:value="330980" calcext:value-type="float">
            <text:p>330980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10.bc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298.76</text:p>
          </table:table-cell>
          <table:table-cell office:value-type="float" office:value="330724" calcext:value-type="float">
            <text:p>330724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10.bch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300.78</text:p>
          </table:table-cell>
          <table:table-cell office:value-type="float" office:value="331176" calcext:value-type="float">
            <text:p>331176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10.bch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301.28</text:p>
          </table:table-cell>
          <table:table-cell office:value-type="float" office:value="330828" calcext:value-type="float">
            <text:p>330828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  <table:table-row table:style-name="ro1">
          <table:table-cell office:value-type="string" calcext:value-type="string">
            <text:p>ex6_2_10.bch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301.69</text:p>
          </table:table-cell>
          <table:table-cell office:value-type="float" office:value="330510" calcext:value-type="float">
            <text:p>330510</text:p>
          </table:table-cell>
          <table:table-cell office:value-type="string" calcext:value-type="string">
            <text:p>[32m optimization successful!</text:p>
          </table:table-cell>
          <table:table-cell/>
          <table:table-cell office:value-type="string" calcext:value-type="string">
            <text:p>validació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2T15:39:41.359161425</dc:date>
    <meta:editing-duration>PT1M9S</meta:editing-duration>
    <meta:editing-cycles>1</meta:editing-cycles>
    <meta:document-statistic meta:table-count="1" meta:cell-count="1664" meta:object-count="0"/>
    <meta:generator>LibreOffice/24.2.7.2$Linux_X86_64 LibreOffice_project/420$Build-2</meta:generator>
  </office:meta>
</office:document-meta>
</file>